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2000002A09BD136815CF750EA.png" manifest:media-type="image/png"/>
  <manifest:file-entry manifest:full-path="Pictures/1000000100000642000002A092A2E241871B0D66.png" manifest:media-type="image/png"/>
  <manifest:file-entry manifest:full-path="Pictures/100000010000058A000002C6CED5BA411B95C8D4.png" manifest:media-type="image/png"/>
  <manifest:file-entry manifest:full-path="Pictures/100000010000085E0000035EFDB215C63DC6562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weight="bold" officeooo:paragraph-rsid="001ff72e" style:font-weight-asian="bold" style:font-weight-complex="bold"/>
    </style:style>
    <style:style style:name="P3" style:family="paragraph" style:parent-style-name="Standard">
      <style:text-properties style:font-name="Arial1" officeooo:paragraph-rsid="001ff72e"/>
    </style:style>
    <style:style style:name="P4" style:family="paragraph" style:parent-style-name="Standard">
      <style:text-properties style:font-name="Arial1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1" fo:font-weight="normal" officeooo:rsid="001ff72e" officeooo:paragraph-rsid="001ff72e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1" fo:font-weight="normal" officeooo:rsid="001ff72e" officeooo:paragraph-rsid="001ff72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1" officeooo:paragraph-rsid="0020acf7"/>
    </style:style>
    <style:style style:name="P8" style:family="paragraph" style:parent-style-name="Standard">
      <style:paragraph-properties fo:text-align="justify" style:justify-single-word="false"/>
      <style:text-properties style:font-name="Arial1" officeooo:paragraph-rsid="001ff72e"/>
    </style:style>
    <style:style style:name="P9" style:family="paragraph" style:parent-style-name="Standard">
      <style:text-properties style:font-name="Arial1" fo:font-weight="bold" officeooo:paragraph-rsid="001ff72e" style:font-weight-asian="bold" style:font-weight-complex="bold"/>
    </style:style>
    <style:style style:name="T1" style:family="text">
      <style:text-properties officeooo:rsid="0020acf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ff7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álise de Eficiência Operacional - Banco do Brasil S/A </text:p>
      <text:p text:style-name="P1"/>
      <text:p text:style-name="P1"/>
      <text:p text:style-name="P2">1. Identificação da Necessidade Prática</text:p>
      <text:p text:style-name="P2"/>
      <text:p text:style-name="P8"><text:tab/>O Banco do Brasil, como instituição de grande porte, monitora mensalmente indicadores críticos: consumo de energia (sustentabilidade), quadro de funcionários (RH) e adoção de tecnologia (inovação). A necessidade prática identificada é a automação da análise de dados. Atualmente, o processamento manual de grandes volumes de dados é lento e sujeito a erros. </text:p>
      <text:p text:style-name="P7"><text:tab/>No contexto da governança corporativa e do compromisso com os Objetivos de Desenvolvimento Sustentável (ODS) da Agenda 2030, o Banco do Brasi<text:span text:style-name="T1">l</text:span> demanda mecanismos precisos de monitoramento de recursos. A necessidade identificada reside na otimização do controle de eficiência energética e digitalização, visando reduzir custos operacionais e mitigar impactos ambientais (ODS 12 e 13).<text:line-break/><text:tab/>A solução proposta consiste no desenvolvimento de um algoritmo em linguagem <text:span text:style-name="T1">P</text:span>ython capaz de processar grandes volumes de dados mensais, aplicar estatística descritiva para identificar padrões de consumo e gerar representações visuais. Esta automação permite que a gestão identifique anomalias no consumo de energia e monitore o avanço da infraestrutura tecnológica de forma auditável e eficiente.</text:p>
      <text:p text:style-name="P3"/>
      <text:p text:style-name="P3"/>
      <text:p text:style-name="P2">2. Implementação do Algoritmo (Python)</text:p>
      <text:p text:style-name="P2"/>
      <text:p text:style-name="P2"><text:span text:style-name="T2"><text:tab/>O algoritmo segue o fluxo lógico de processamento de dados (Entrada-Processamento-Saída):<text:line-break/><text:tab/></text:span>1. Declaração de Bibliotecas:<text:span text:style-name="T2"> Importação de ferramentas específicas para análise de dados (pandas) e plotagem gráfica (matplotlib).<text:line-break/><text:tab/></text:span>2. Estruturação de Dados:<text:span text:style-name="T2"> Organização dos indicadores (Consumo, Funcionários e Tecnologia) em estruturas matriciais (DataFrames).<text:line-break/><text:tab/></text:span>3. Cálculo Estatístico:<text:span text:style-name="T2"> Aplicação de funções matemáticas para obtenção de Média, Mediana e Moda.<text:line-break/><text:tab/></text:span>4. Renderização Visual:<text:span text:style-name="T2"> Geração de gráficos de linha e barras para análise de tendências temporais.</text:span><text:line-break/></text:p>
      <text:p text:style-name="P2"/>
      <text:p text:style-name="P2"><draw:frame draw:style-name="fr1" draw:name="Figura1" text:anchor-type="char" svg:width="17cm" svg:height="7.13cm" draw:z-index="0"><draw:image xlink:href="Pictures/1000000100000642000002A092A2E241871B0D66.png" xlink:type="simple" xlink:show="embed" xlink:actuate="onLoad" draw:mime-type="image/png"/></draw:frame></text:p>
      <text:p text:style-name="P2"><text:soft-page-break/></text:p>
      <text:p text:style-name="P2"><draw:frame draw:style-name="fr1" draw:name="Figura2" text:anchor-type="char" svg:width="17cm" svg:height="6.84cm" draw:z-index="1"><draw:image xlink:href="Pictures/100000010000085E0000035EFDB215C63DC65629.png" xlink:type="simple" xlink:show="embed" xlink:actuate="onLoad" draw:mime-type="image/png"/></draw:frame></text:p>
      <text:p text:style-name="P2"/>
      <text:p text:style-name="P2"><draw:frame draw:style-name="fr1" draw:name="Figura3" text:anchor-type="char" svg:width="17cm" svg:height="7.13cm" draw:z-index="2"><draw:image xlink:href="Pictures/1000000100000642000002A09BD136815CF750EA.png" xlink:type="simple" xlink:show="embed" xlink:actuate="onLoad" draw:mime-type="image/png"/></draw:frame></text:p>
      <text:p text:style-name="P2"><draw:frame draw:style-name="fr1" draw:name="Figura4" text:anchor-type="char" svg:width="17cm" svg:height="8.511cm" draw:z-index="3"><draw:image xlink:href="Pictures/100000010000058A000002C6CED5BA411B95C8D4.png" xlink:type="simple" xlink:show="embed" xlink:actuate="onLoad" draw:mime-type="image/png"/></draw:frame></text:p>
      <text:p text:style-name="P2"/>
      <text:p text:style-name="P2"><text:soft-page-break/><text:span text:style-name="T3">3. Interpretação dos Resultados</text:span></text:p>
      <text:p text:style-name="P5"/>
      <text:p text:style-name="P6"><text:tab/>A análise dos resultados demonstra que a média de consumo energético (**1.241,67 MWh**) mantém-se em conformidade com a mediana (**1.250 MWh**), sugerindo uma distribuição de dados com baixa variabilidade e ausência de *outliers* significativos no período. Do ponto de vista da **Ética e Sustentabilidade**, o crescimento observado no gráfico de barras referente ao uso de recursos tecnológicos (atingindo 85% em maio) ratifica o investimento do Banco do Brasil na digitalização de processos.<text:line-break/>Esta transição para o digital reduz a dependência de infraestruturas físicas e consumo de papel, alinhando a prática organizacional ao **ODS 9 (Indústria, Inovação e Infraestrutura)** e ao **ODS 12 (Consumo e Produção Responsáveis)**. Conclui-se que o algoritmo desenvolvido cumpre seu papel de suporte à decisão, transformando dados brutos em inteligência estratégica para a governança corporativ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0T13:39:20.393000000</meta:creation-date>
    <dc:date>2026-05-12T11:32:40.684000000</dc:date>
    <meta:editing-duration>PT30M26S</meta:editing-duration>
    <meta:editing-cycles>2</meta:editing-cycles>
    <meta:generator>LibreOffice/7.5.1.2$Windows_X86_64 LibreOffice_project/fcbaee479e84c6cd81291587d2ee68cba099e129</meta:generator>
    <meta:document-statistic meta:table-count="0" meta:image-count="4" meta:object-count="0" meta:page-count="3" meta:paragraph-count="8" meta:word-count="385" meta:character-count="2752" meta:non-whitespace-character-count="2363"/>
  </office:meta>
</office:document-meta>
</file>