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E00000338C58A7A2A6708F7AB.png" manifest:media-type="image/png"/>
  <manifest:file-entry manifest:full-path="Pictures/100000010000041A0000027A58D19CA61A0D71A6.png" manifest:media-type="image/png"/>
  <manifest:file-entry manifest:full-path="Pictures/10000001000006CE00000312C8A909629C1EE9A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fo:font-weight="bold" officeooo:paragraph-rsid="001ff72e" style:font-weight-asian="bold" style:font-weight-complex="bold"/>
    </style:style>
    <style:style style:name="P3" style:family="paragraph" style:parent-style-name="Standard">
      <style:text-properties style:font-name="Arial1" fo:font-weight="bold" officeooo:rsid="001ff72e" officeooo:paragraph-rsid="001ff72e" style:font-weight-asian="bold" style:font-weight-complex="bold"/>
    </style:style>
    <style:style style:name="P4" style:family="paragraph" style:parent-style-name="Standard">
      <style:text-properties style:font-name="Arial1" officeooo:paragraph-rsid="001ff72e"/>
    </style:style>
    <style:style style:name="P5" style:family="paragraph" style:parent-style-name="Standard">
      <style:paragraph-properties fo:text-align="justify" style:justify-single-word="false"/>
      <style:text-properties style:font-name="Arial1" officeooo:paragraph-rsid="001ff72e"/>
    </style:style>
    <style:style style:name="P6" style:family="paragraph" style:parent-style-name="Standard">
      <style:text-properties style:font-name="Arial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1" fo:font-weight="normal" officeooo:rsid="001ff72e" officeooo:paragraph-rsid="001ff72e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1" fo:font-weight="normal" officeooo:rsid="001ff72e" officeooo:paragraph-rsid="001ff72e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nálise de Eficiência Operacional - Banco do Brasil S/A </text:p>
      <text:p text:style-name="P1"/>
      <text:p text:style-name="P1"/>
      <text:p text:style-name="P2">1. Identificação da Necessidade Prática</text:p>
      <text:p text:style-name="P5"><text:tab/>O Banco do Brasil, como instituição de grande porte, monitora mensalmente indicadores críticos: consumo de energia (sustentabilidade), quadro de funcionários (RH) e adoção de tecnologia (inovação). A necessidade prática identificada é a automação da análise de dados. Atualmente, o processamento manual de grandes volumes de dados é lento e sujeito a erros. Um algoritmo em Python permite a extração imediata de tendências (Média, Mediana, Moda) e a geração de alertas automáticos para desvios de consumo, otimizando a tomada de decisão estratégica.</text:p>
      <text:p text:style-name="P4"/>
      <text:p text:style-name="P4"/>
      <text:p text:style-name="P2">2. Implementação do Algoritmo (Python)</text:p>
      <text:p text:style-name="P2"><draw:frame draw:style-name="fr2" draw:name="Figura1" text:anchor-type="char" svg:x="-0.079cm" svg:y="0.351cm" svg:width="15.748cm" svg:height="10.028cm" draw:z-index="0"><draw:image xlink:href="Pictures/100000010000050E00000338C58A7A2A6708F7AB.png" xlink:type="simple" xlink:show="embed" xlink:actuate="onLoad" draw:mime-type="image/png"/></draw:frame><draw:frame draw:style-name="fr2" draw:name="Figura2" text:anchor-type="char" svg:x="0.185cm" svg:y="10.86cm" svg:width="15.381cm" svg:height="9.285cm" draw:z-index="1"><draw:image xlink:href="Pictures/100000010000041A0000027A58D19CA61A0D71A6.png" xlink:type="simple" xlink:show="embed" xlink:actuate="onLoad" draw:mime-type="image/png"/></draw:frame></text:p>
      <text:p text:style-name="P2"><draw:frame draw:style-name="fr1" draw:name="Figura3" text:anchor-type="char" svg:width="17cm" svg:height="7.669cm" draw:z-index="2"><draw:image xlink:href="Pictures/10000001000006CE00000312C8A909629C1EE9A0.png" xlink:type="simple" xlink:show="embed" xlink:actuate="onLoad" draw:mime-type="image/png"/></draw:frame><text:soft-page-break/></text:p>
      <text:p text:style-name="P2"/>
      <text:p text:style-name="P3">3. Funcionamento e Comentários</text:p>
      <text:p text:style-name="P7"/>
      <text:p text:style-name="P8"><text:tab/>Dicionário de Dados: O código começa criando um dicionário chamado dados_banco. Ele armazena as listas de números que extraímos da tabela do PDF (Consumo de energia, funcionários e tecnologia).<text:line-break/><text:tab/>A Função analisar_indicadores: Esta é a "máquina" do código. Ela recebe uma lista de números e usa a biblioteca statistics para encontrar o valor central (mediana) e o valor mais comum (moda).<text:line-break/><text:tab/>Lógica de Decisão (if/else): Além de calcular, o código toma uma decisão. Ele compara o valor do último mês (Junho) com a média calculada. Se o banco gastou mais energia em Junho do que a média dos meses anteriores, o sistema imprime um "ALERTA".<text:line-break/><text:tab/>O Loop for: Este comando percorre todos os indicadores automaticamente, evitando que o programador tenha que escrever o código de cálculo três vezes.</text:p>
      <text:p text:style-name="P8"/>
      <text:p text:style-name="P8"><text:tab/>Exemplos de Saída:</text:p>
      <text:p text:style-name="P8"/>
      <text:p text:style-name="P8"><text:tab/>Para Energia: Ele mostrará a média de 1241.67 MWh. Como o último valor (Junho) foi 1250, o sistema exibirá um alerta de consumo acima da média.<text:line-break/><text:tab/>Para Tecnologia: Ele mostrará o crescimento e a moda de 80%, ajudando a TI a entender qual nível de digitalização é o mais frequente na estrutura do banco.</text:p>
      <text:p text:style-name="P8"><text:line-break/><text:tab/>Este algoritmo resolve a necessidade de monitoramento em tempo real, permitindo que os gestores foquem na solução de problemas em vez de perder tempo com cálculos manuai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10T13:39:20.393000000</meta:creation-date>
    <dc:date>2026-05-10T13:47:30.595000000</dc:date>
    <meta:editing-duration>PT8M10S</meta:editing-duration>
    <meta:editing-cycles>1</meta:editing-cycles>
    <meta:document-statistic meta:table-count="0" meta:image-count="3" meta:object-count="0" meta:page-count="2" meta:paragraph-count="9" meta:word-count="316" meta:character-count="1993" meta:non-whitespace-character-count="1675"/>
    <meta:generator>LibreOffice/7.5.1.2$Windows_X86_64 LibreOffice_project/fcbaee479e84c6cd81291587d2ee68cba099e129</meta:generator>
  </office:meta>
</office:document-meta>
</file>